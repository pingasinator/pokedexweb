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Google Sans Flex" svg:font-family="'Google Sans Flex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Nastaliq Urdu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des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_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n bulbe dorsal devient si gros qu'il ne peut plus se tenir sur ses membres postérieur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n emmagasinant de l'énergie, son bulbe grossit. Il en émane un arôme quand il va éclore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e bouton sur son dos pompe apparemment l'énergie de son corps. On raconte que ce bouton devient une superbe fleur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on bulbe dorsal devient si gros qu'il ne peut plus se tenir sur ses membres postérieur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n emmagasinant de l'énergie, son bulbe grossit. Il en émane un arôme quand il va éclore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e bouton sur son dos pompe apparemment l'énergie de son corps. On raconte que ce bouton devient une superbe fleur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a plante mûrit en absorbant les rayons du soleil. Il migre souvent vers les endroits ensoleillé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es pétales de sa fleur dorsale absorbent les rayons du soleil pour en faire de l'énergi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Il absorbe l'énergie solaire pour se nourrir. En captant les rayons, il se tient calme et immobil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l préfère les endroits chauds. En cas de pluie, de la vapeur se forme autour de sa queue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a flammèche au bout de sa queue émet un son crépitant audible seulement dans un endroit calme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ême les plus jeunes ont une queue enflammée. On raconte que les petits, peu habitués au feu, se brûlent par acciden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n agitant sa queue, il peut élever le niveau de la température à un degré incroyabl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e Pokémon est violent. Dans la furie d'un combat son aura brille d'une flamme bleuté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On le dit très cruel. Il attaque de ses griffes acérées et ne s'arrête qu'une fois l'ennemi terrassé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Il peut fondre la roche de son souffle brûlant. Il est souvent la cause de nombreux incendies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Quand il crache son souffle brûlant, la flamme au bout de sa queue s'embrase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on souffle de feu atteint d'incroyables températures. Il peut très rapidement fondre des glaciers de 10.000 tonnes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on dos durcit avec l'âge et devient une super carapace. Il peut cracher des jets d'écume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aché sous l'eau, il crache un jet d'eau sur sa proie et se cache à l'intérieur de sa coquille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près la naissance, sa carapace met du temps à grandir et durcir. Il peut cracher de puissants jets d'écume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l se cache au fond de l'eau pour guetter sa proie. Ses oreilles sont des gouvernail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ttaqué, il cache sa tête dans sa carapace, mais son corps trop gros ne peut y tenir en entier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a queue est couverte d'une riche fourrure. Il garde de l'air dans cette toison avant un long trajet sous l'eau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Un Pokémon brutal armé de canons hydrauliques. Ses puissants jets d'eau sont dévastateurs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Une fois sa cible alignée, il projette des jets d'eau plus puissants qu'une lance à incendie.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es deux excroissances sortant de sa carapace propulse des jets d'eau comme un canon, pouvant briser d'épaisses murailles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s petites pattes sont équipées de ventouses, lui permettant de grimper aux murs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Quand on touche l'appendice sur son front, il sécrète un gaz puant pour se protéger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Les larges dessins sur sa tête lui servent de protection: ils peuvent en effet effrayer certains ennemis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Il est vulnérable aux attaques tant que sa carapace fragile expose son corps tendre et mou.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Il renforce sa carapace pour se protéger. Mais un coup puissant peut le déloger de son armure.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En durcissant, seule la coquille externe devient comme la pierre. La partie interne reste toute molle.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Google Sans Flex" svg:font-family="'Google Sans Flex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09:18:23.700360186</meta:creation-date>
    <dc:date>2026-05-21T09:42:58.161087973</dc:date>
    <meta:editing-duration>PT24M34S</meta:editing-duration>
    <meta:editing-cycles>3</meta:editing-cycles>
    <meta:generator>LibreOffice/26.2.3.2$Linux_X86_64 LibreOffice_project/620$Build-2</meta:generator>
    <meta:document-statistic meta:table-count="1" meta:cell-count="301" meta:object-count="0"/>
  </office:meta>
</office:document-meta>
</file>